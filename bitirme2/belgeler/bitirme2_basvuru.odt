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>
    <style:style style:name="TableStyle" style:family="table" style:display-name="TableStyle">
      <style:table-properties style:width="16cm" table:align="margins"/>
    </style:style>
    <style:style style:name="Col1" style:family="table-column" style:display-name="Col1">
      <style:table-column-properties style:column-width="4cm"/>
    </style:style>
    <style:style style:name="Col2" style:family="table-column" style:display-name="Col2">
      <style:table-column-properties style:column-width="12cm"/>
    </style:style>
    <style:style style:name="CellStyle" style:family="table-cell" style:display-name="CellStyle">
      <style:table-cell-properties fo:border="0.05pt solid #000000" fo:padding="0.2cm"/>
    </style:style>
    <style:style style:name="OnayTable" style:family="table" style:display-name="OnayTable">
      <style:table-properties style:width="16cm" table:align="margins"/>
    </style:style>
    <style:style style:name="OnayCol1" style:family="table-column" style:display-name="OnayCol1">
      <style:table-column-properties style:column-width="12cm"/>
    </style:style>
    <style:style style:name="OnayCol2" style:family="table-column" style:display-name="OnayCol2">
      <style:table-column-properties style:column-width="4cm"/>
    </style:style>
  </office:automatic-styles>
  <office:body>
    <office:text>
      <text:p text:style-name="Title">İSTANBUL TEKNİK ÜNİVERSİTESİ</text:p>
      <text:p text:style-name="Title">FEN-EDEBİYAT FAKÜLTESİ</text:p>
      <text:p text:style-name="Subtitle">Bitirme Çalışması Başvuru Formu</text:p>
      <text:p text:style-name="SectionHead">Öğrencinin</text:p>
      <table:table table:style-name="TableStyle">
        <table:table-column table:style-name="Col1"/>
        <table:table-column table:style-name="Col2"/>
        <table:table-row>
          <table:table-cell table:style-name="CellStyle">
            <text:p text:style-name="Normal">Adı Soyadı:</text:p>
          </table:table-cell>
          <table:table-cell table:style-name="CellStyle">
            <text:p text:style-name="Normal">Berke Tezgöçen</text:p>
          </table:table-cell>
        </table:table-row>
        <table:table-row>
          <table:table-cell table:style-name="CellStyle">
            <text:p text:style-name="Normal">Numarası:</text:p>
          </table:table-cell>
          <table:table-cell table:style-name="CellStyle">
            <text:p text:style-name="Normal">090200140</text:p>
          </table:table-cell>
        </table:table-row>
        <table:table-row>
          <table:table-cell table:style-name="CellStyle">
            <text:p text:style-name="Normal">Bölümü:</text:p>
          </table:table-cell>
          <table:table-cell table:style-name="CellStyle">
            <text:p text:style-name="Normal">Fizik Mühendisliği Bölümü</text:p>
          </table:table-cell>
        </table:table-row>
      </table:table>
      <text:p text:style-name="SectionHead">Çalışmayı Yönetenin</text:p>
      <table:table table:style-name="TableStyle">
        <table:table-column table:style-name="Col1"/>
        <table:table-column table:style-name="Col2"/>
        <table:table-row>
          <table:table-cell table:style-name="CellStyle">
            <text:p text:style-name="Normal">Ünvanı:</text:p>
          </table:table-cell>
          <table:table-cell table:style-name="CellStyle">
            <text:p text:style-name="Normal">Prof. Dr.</text:p>
          </table:table-cell>
        </table:table-row>
        <table:table-row>
          <table:table-cell table:style-name="CellStyle">
            <text:p text:style-name="Normal">Adı Soyadı:</text:p>
          </table:table-cell>
          <table:table-cell table:style-name="CellStyle">
            <text:p text:style-name="Normal">Emre Onur Kahya</text:p>
          </table:table-cell>
        </table:table-row>
        <table:table-row>
          <table:table-cell table:style-name="CellStyle">
            <text:p text:style-name="Normal">Bölümü:</text:p>
          </table:table-cell>
          <table:table-cell table:style-name="CellStyle">
            <text:p text:style-name="Normal">Fizik Mühendisliği Bölümü</text:p>
          </table:table-cell>
        </table:table-row>
      </table:table>
      <text:p text:style-name="SectionHead">Tarih</text:p>
      <table:table table:style-name="TableStyle">
        <table:table-column table:style-name="Col1"/>
        <table:table-column table:style-name="Col2"/>
        <table:table-row>
          <table:table-cell table:style-name="CellStyle">
            <text:p text:style-name="Normal">Tarih:</text:p>
          </table:table-cell>
          <table:table-cell table:style-name="CellStyle">
            <text:p text:style-name="Normal">16.02.2026</text:p>
          </table:table-cell>
        </table:table-row>
      </table:table>
      <text:p text:style-name="SectionHead">Bitirme Çalışmasının Konusu:</text:p>
      <text:p text:style-name="Normal">Yüksek Reynolds sayılı (Re=10.000) üç boyutlu karışık konveksiyon akışlarının (Kolmogorov zorlaması + Rayleigh-Bénard konveksiyonu) fizik gömülü spektral sinir ağları ile modellenmesi</text:p>
      <text:p text:style-name="Normal"/>
      <text:p text:style-name="SectionHead">Bölüm Başkanı Onayı</text:p>
      <table:table table:style-name="OnayTable">
        <table:table-column table:style-name="OnayCol1"/>
        <table:table-column table:style-name="OnayCol2"/>
        <table:table-row>
          <table:table-cell table:style-name="CellStyle">
            <text:p text:style-name="Normal"/>
            <text:p text:style-name="Normal"/>
          </table:table-cell>
          <table:table-cell table:style-name="CellStyle">
            <text:p text:style-name="Normal">Tarih: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Bold" style:family="text" style:display-name="Bold">
      <style:text-properties fo:font-weight="bold" fo:font-size="12pt"/>
    </style:style>
    <style:style style:name="Title" style:family="paragraph" style:display-name="Title">
      <style:paragraph-properties fo:text-align="center" fo:margin-bottom="0.3cm"/>
      <style:text-properties fo:font-weight="bold" fo:font-size="14pt"/>
    </style:style>
    <style:style style:name="Subtitle" style:family="paragraph" style:display-name="Subtitle">
      <style:paragraph-properties fo:text-align="center" fo:margin-bottom="0.5cm"/>
      <style:text-properties fo:font-weight="bold" fo:font-size="13pt" style:text-underline-style="solid"/>
    </style:style>
    <style:style style:name="SectionHead" style:family="paragraph" style:display-name="SectionHead">
      <style:paragraph-properties fo:margin-top="0.5cm" fo:margin-bottom="0.2cm"/>
      <style:text-properties fo:font-weight="bold" fo:font-size="12pt"/>
    </style:style>
    <style:style style:name="Normal" style:family="paragraph" style:display-name="Normal">
      <style:text-properties fo:font-size="12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